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6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6%" fo:text-indent="0cm" style:auto-text-indent="false" style:writing-mode="lr-tb"/>
      <style:text-properties officeooo:paragraph-rsid="000ae1ff"/>
    </style:style>
    <style:style style:name="P3" style:family="paragraph" style:parent-style-name="Standard">
      <style:text-properties officeooo:paragraph-rsid="000ae1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e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o (<text:span text:style-name="T1">id_moto</text:span>, modelo, año, color, descripción, historia, <text:span text:style-name="T2">tipo,</text:span> marca_id)</text:p>
      <text:p text:style-name="P1"><text:tab/>marca_id CLAVE FORANEA REFERENCIA marca (id)</text:p>
      <text:p text:style-name="P1"/>
      <text:p text:style-name="P1">imagen (<text:span text:style-name="T1">id_imagen</text:span>, ruta_imagen, moto_id)</text:p>
      <text:p text:style-name="P2"><text:tab/>moto_id CLAVE FORANEA REFERENCIA moto (id)</text:p>
      <text:p text:style-name="P2"/>
      <text:p text:style-name="P1">marca (<text:span text:style-name="T1">id_marca</text:span>, nombre, pais_id)</text:p>
      <text:p text:style-name="P2"><text:tab/><text:span text:style-name="T2">pais</text:span>_id CLAVE FORANEA REFERENCIA <text:span text:style-name="T2">pais</text:span> (id)</text:p>
      <text:p text:style-name="P1"/>
      <text:p text:style-name="P1">pais (<text:span text:style-name="T1">id_pais</text:span>, nombre, continente)</text:p>
      <text:p text:style-name="P1">comentario (<text:span text:style-name="T1">id_comentario</text:span>, texto, puntuación, fecha, usuario_id, moto_id)</text:p>
      <text:p text:style-name="P2"><text:tab/><text:span text:style-name="T2">usuario</text:span>_id CLAVE FORANEA REFERENCIA <text:span text:style-name="T2">usuario</text:span> (id)</text:p>
      <text:p text:style-name="P2"><text:tab/>moto_id CLAVE FORANEA REFERENCIA moto (id)</text:p>
      <text:p text:style-name="P1"/>
      <text:p text:style-name="P1">usuario (<text:span text:style-name="T1">id_usuario</text:span>, nombre_usuario, contraseña, rol)</text:p>
      <text:p text:style-name="P1">favoritos (<text:span text:style-name="T1">id_favorito</text:span>, fecha, usuario_id, moto_id)</text:p>
      <text:p text:style-name="P3"><text:tab/><text:span text:style-name="T2">usuario</text:span>_id CLAVE FORANEA REFERENCIA <text:span text:style-name="T2">usuario</text:span> (id)</text:p>
      <text:p text:style-name="P2"><text:tab/>moto_id CLAVE FORANEA REFERENCIA moto (i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2:11:52.648961700</meta:creation-date>
    <dc:date>2026-03-07T12:17:06.823583800</dc:date>
    <meta:editing-duration>PT5M15S</meta:editing-duration>
    <meta:editing-cycles>1</meta:editing-cycles>
    <meta:document-statistic meta:table-count="0" meta:image-count="0" meta:object-count="0" meta:page-count="1" meta:paragraph-count="14" meta:word-count="80" meta:character-count="672" meta:non-whitespace-character-count="599"/>
    <meta:generator>LibreOffice/25.2.7.2$Windows_X86_64 LibreOffice_project/5cbfd1ab6520636bb5f7b99185aa69bd7456825d</meta:generator>
  </office:meta>
</office:document-meta>
</file>