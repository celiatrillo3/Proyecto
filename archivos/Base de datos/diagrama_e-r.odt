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1000003CBD350F3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d9d" officeooo:paragraph-rsid="00120d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1.783cm" svg:y="1.27cm" svg:width="20.454cm" svg:height="22.541cm" draw:z-index="0"><draw:image xlink:href="Pictures/1000000100000371000003CBD350F382.png" xlink:type="simple" xlink:show="embed" xlink:actuate="onLoad" draw:mime-type="image/png"/></draw:frame>Celia Trillo Carballo</text:p>
      <text:p text:style-name="P1">Diagrama entidad-relación trabajo de fin de cic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12:43:24.397579600</meta:creation-date>
    <dc:date>2026-01-26T13:09:22.481787200</dc:date>
    <meta:editing-duration>PT15M38S</meta:editing-duration>
    <meta:editing-cycles>1</meta:editing-cycles>
    <meta:document-statistic meta:table-count="0" meta:image-count="1" meta:object-count="0" meta:page-count="1" meta:paragraph-count="2" meta:word-count="10" meta:character-count="70" meta:non-whitespace-character-count="62"/>
    <meta:generator>LibreOffice/25.2.7.2$Windows_X86_64 LibreOffice_project/5cbfd1ab6520636bb5f7b99185aa69bd7456825d</meta:generator>
  </office:meta>
</office:document-meta>
</file>